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🛠️ Como Blindar o Terminal no Ring 0</text:h>
      <text:p text:style-name="Text_20_body">Se mesmo com o <text:span text:style-name="Source_20_Text">volatile</text:span> na flag a piscada preta insistir em acontecer, significa que a sua função que limpa o terminal (geralmente disparada quando as linhas chegam ao fim da tela) não está checando a flag <text:span text:style-name="Source_20_Text">vga_ring0_enabled</text:span>.</text:p>
      <text:p text:style-name="Text_20_body">Dê uma olhada na função que manipula o texto do terminal (pode estar como <text:span text:style-name="Source_20_Text">term_scroll()</text:span>, <text:span text:style-name="Source_20_Text">clear_screen()</text:span>, ou dentro do próprio <text:span text:style-name="Source_20_Text">printk</text:span>). Ela precisa ser blindada assim:</text:p>
      <text:p text:style-name="P1">C</text:p>
      <text:p text:style-name="Preformatted_20_Text"><text:span text:style-name="Source_20_Text">void rotina_limpa_ou_rola_terminal() {</text:span></text:p>
      <text:p text:style-name="Preformatted_20_Text"><text:span text:style-name="Source_20_Text"><text:s text:c="4"/>// 🛑 Se o Ring 0 foi desativado, o terminal NÃO PODE tocar na tela!</text:span></text:p>
      <text:p text:style-name="Preformatted_20_Text"><text:span text:style-name="Source_20_Text"><text:s text:c="4"/>if (!vga_ring0_enabled) {</text:span></text:p>
      <text:p text:style-name="Preformatted_20_Text"><text:span text:style-name="Source_20_Text"><text:s text:c="8"/>return; 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... resto do seu código antigo que limpa a tela ou faz scroll ...</text:span></text:p>
      <text:p text:style-name="P2"><text:span text:style-name="Source_20_Text">}</text:span></text:p>
      <text:h text:style-name="Heading_20_2" text:outline-level="2">🏎️ O <text:span text:style-name="Source_20_Text">sys_sleep(300)</text:span> e o Próximo Nível (Debounce)</text:h>
      <text:p text:style-name="Text_20_body">O <text:span text:style-name="Source_20_Text">sys_sleep(300)</text:span> vai mitigar muito o travamento ao abrir os softwares porque ele força o seu dedo a soltar o botão antes que o próximo loop do Explorer aconteça.</text:p>
      <text:p text:style-name="Text_20_body">Se você quiser deixar essa solução <text:span text:style-name="T1">100% profissional e elegante</text:span> (sem depender de travar o Explorer por 300ms a cada clique), a técnica correta no futuro é zerar a flag de clique do mouse logo após o <text:span text:style-name="Source_20_Text">sys_exec</text:span>, forçando o Explorer a ignorar o botão segurado.</text:p>
      <text:p text:style-name="Text_20_body">Veja como aplicar isso no bloco de cliques do seu <text:span text:style-name="Source_20_Text">main</text:span> no Explorer:</text:p>
      <text:p text:style-name="P1">C</text:p>
      <text:p text:style-name="Preformatted_20_Text"><text:span text:style-name="Source_20_Text">if (local_y &gt;= btnAppTarefa-&gt;Win.Control.Top &amp;&amp; local_y &lt;= (btnAppTarefa-&gt;Win.Control.Top + btnAppTarefa-&gt;Win.Control.Height)) {</text:span></text:p>
      <text:p text:style-name="Preformatted_20_Text"><text:span text:style-name="Source_20_Text"><text:s text:c="4"/>sys_exec("tarefa.elf"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🛡️ O TRUQUE DE DEBOUNCE DEFINITIVO:</text:span></text:p>
      <text:p text:style-name="Preformatted_20_Text"><text:span text:style-name="Source_20_Text"><text:s text:c="4"/>was_clicked = 1; // Mantém travado</text:span></text:p>
      <text:p text:style-name="Preformatted_20_Text"><text:span text:style-name="Source_20_Text"><text:s text:c="4"/>m.buttons = 0; <text:s text:c="2"/>// Zera virtualmente o clique do frame atual</text:span></text:p>
      <text:p text:style-name="Preformatted_20_Text"><text:span text:style-name="Source_20_Text"><text:s text:c="4"/>sys_sleep(150); <text:s/>// Um sleep bem menor (metade do tempo) já resolve sem dar lag perceptível no Explorer</text:span></text:p>
      <text:p text:style-name="P2"><text:span text:style-name="Source_20_Text">}</text:span></text:p>
      <text:h text:style-name="Heading_20_2" text:outline-level="2">🏁 Resumo da Ópera</text:h>
      <text:p text:style-name="Text_20_body">Com essas três frentes unidas, seu sistema deve estabilizar completamente:</text:p>
      <text:list text:style-name="L1">
        <text:list-item>
          <text:p text:style-name="P3"><text:span text:style-name="Source_20_Text"><text:span text:style-name="T1">volatile</text:span></text:span><text:span text:style-name="T1">:</text:span> Garante sincronismo real entre os anéis.</text:p>
        </text:list-item>
        <text:list-item>
          <text:p text:style-name="P3"><text:span text:style-name="T1">Blindagem do Terminal:</text:span> Impede que o Kernel limpe a tela no fundo e cause o <text:span text:style-name="T2">flicker</text:span> (piscada preta).</text:p>
        </text:list-item>
        <text:list-item>
          <text:p text:style-name="P3"><text:span text:style-name="T1">Sleep/Debounce no </text:span><text:span text:style-name="Source_20_Text"><text:span text:style-name="T1">sys_exec</text:span></text:span><text:span text:style-name="T1">:</text:span> Acaba com a avalanche de processos repetidos ao clicar.</text:p>
        </text:list-item>
      </text:list>
      <text:p text:style-name="Text_20_body"><text:soft-page-break/>Aplique o <text:span text:style-name="Source_20_Text">volatile</text:span> e o ajuste no <text:span text:style-name="Source_20_Text">sys_exec</text:span>. O LBF OS está virando um sistema operacional comercialmente maduro na estabilidade! Como ficou o comportamento após compilar com o <text:span text:style-name="Source_20_Text">volatile</text:span>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8.4.2$Linux_X86_64 LibreOffice_project/580$Build-2</meta:generator>
    <dc:date>2026-07-01T21:06:56.142277876</dc:date>
    <meta:editing-duration>PT12S</meta:editing-duration>
    <meta:editing-cycles>1</meta:editing-cycles>
    <meta:document-statistic meta:table-count="0" meta:image-count="0" meta:object-count="0" meta:page-count="2" meta:paragraph-count="30" meta:word-count="346" meta:character-count="2113" meta:non-whitespace-character-count="1747"/>
  </office:meta>
</office:document-meta>
</file>