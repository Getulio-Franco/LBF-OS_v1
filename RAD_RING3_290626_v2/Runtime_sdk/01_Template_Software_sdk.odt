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3.471cm"/>
    </style:style>
    <style:style style:name="Tabela1.B" style:family="table-column">
      <style:table-column-properties style:column-width="3.51cm"/>
    </style:style>
    <style:style style:name="Tabela1.C" style:family="table-column">
      <style:table-column-properties style:column-width="3.314cm"/>
    </style:style>
    <style:style style:name="Tabela1.D" style:family="table-column">
      <style:table-column-properties style:column-width="6.705cm"/>
    </style:style>
    <style:style style:name="Tabela1.A1" style:family="table-cell">
      <style:table-cell-properties style:vertical-align="middle" fo:padding-left="0.318cm" fo:padding-right="0.318cm" fo:padding-top="0.212cm" fo:padding-bottom="0.212cm" fo:border="0.05pt solid #c4c7c5"/>
    </style:style>
    <style:style style:name="P1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2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3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4" style:family="paragraph" style:parent-style-name="Heading_20_2">
      <style:paragraph-properties fo:margin-left="0cm" fo:margin-right="0cm" fo:margin-top="0cm" fo:margin-bottom="0.212cm" style:contextual-spacing="false" fo:line-height="114%" fo:text-indent="0cm" style:auto-text-indent="false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6" style:family="paragraph" style:parent-style-name="Preformatted_20_Text">
      <style:paragraph-properties fo:margin-top="0cm" fo:margin-bottom="0cm" style:contextual-spacing="false" fo:line-height="114%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8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9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11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12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T1" style:family="text">
      <style:text-properties style:font-name="Google Sans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style:font-name="Google Sans Text" fo:font-weight="bold"/>
    </style:style>
    <style:style style:name="T5" style:family="text">
      <style:text-properties style:font-name="Google Sans Text"/>
    </style:style>
    <style:style style:name="T6" style:family="text">
      <style:text-properties style:font-name="Google Sans Text" fo:font-style="itali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🚀 <text:span text:style-name="T1">1. A Tecnologia: LBF RAD-SDK (Event-Driven &amp; IPC Layer)</text:span></text:h>
      <text:p text:style-name="P1">O novo ecossistema de desenvolvimento do LBF OS baseia-se na tecnologia <text:span text:style-name="T2">LBF RAD-SDK</text:span> (baseada no modelo <text:span text:style-name="T3">Rapid Application Development</text:span> e inspirada no conceito clássico da VCL).</text:p>
      <text:h text:style-name="P2" text:outline-level="3">O que ela faz?</text:h>
      <text:p text:style-name="P1">Ela isola o aplicativo de detalhes de baixo nível do hardware. O software não desenha na tela diretamente; ele gerencia <text:span text:style-name="T2">componentes visuais baseados em objetos e propriedades</text:span> (Labels, Edits, ListViews, Buttons) e reage a estímulos externos (teclado e mouse) por meio de funções de retorno (<text:span text:style-name="T2">Callbacks</text:span>).</text:p>
      <text:h text:style-name="P2" text:outline-level="3">Como funcionam os softwares da SDK?</text:h>
      <text:list text:style-name="L1">
        <text:list-item>
          <text:p text:style-name="P3"><text:span text:style-name="T4">Registro IPC:</text:span><text:span text:style-name="T5"> O aplicativo anuncia sua existência ao Kernel e ao Compositor usando </text:span><text:span text:style-name="Source_20_Text"><text:span text:style-name="T5">OS_IPC_RegisterApp</text:span></text:span><text:span text:style-name="T5">, recebendo um </text:span><text:span text:style-name="T6">Slot</text:span><text:span text:style-name="T5"> exclusivo de comunicação.</text:span></text:p>
        </text:list-item>
        <text:list-item>
          <text:p text:style-name="P3"><text:span text:style-name="T4">Double-Buffering em Memória Compartilhada:</text:span><text:span text:style-name="T5"> Cada app possui dois buffers de vídeo privados (</text:span><text:span text:style-name="Source_20_Text"><text:span text:style-name="T5">buffer_ptr_0</text:span></text:span><text:span text:style-name="T5"> e </text:span><text:span text:style-name="Source_20_Text"><text:span text:style-name="T5">buffer_ptr_1</text:span></text:span><text:span text:style-name="T5">). O app renderiza seus componentes no buffer local e, ao terminar, faz o </text:span><text:span text:style-name="T6">Flush</text:span><text:span text:style-name="T5"> (cópia via </text:span><text:span text:style-name="Source_20_Text"><text:span text:style-name="T5">memcpy</text:span></text:span><text:span text:style-name="T5">) para o buffer compartilhado ativo, alternando o índice para que o Compositor exiba a imagem pronta, evitando oscilações na tela (</text:span><text:span text:style-name="T6">flickering</text:span><text:span text:style-name="T5">).</text:span></text:p>
        </text:list-item>
        <text:list-item>
          <text:p text:style-name="P3"><text:span text:style-name="T4">Loop de Foco Reativo:</text:span><text:span text:style-name="T5"> Os aplicativos rodam em modo econômico (</text:span><text:span text:style-name="Source_20_Text"><text:span text:style-name="T5">sys_sleep</text:span></text:span><text:span text:style-name="T5">), processando entradas de teclado e mouse apenas se tiverem o foco ativo do sistema, mas garantindo que atualizações visuais de borda e moldura ocorram de forma assíncrona.</text:span></text:p>
        </text:list-item>
      </text:list>
      <text:h text:style-name="P4" text:outline-level="2">🛠️ <text:span text:style-name="T1">2. O Blueprint Padrão para Novos Softwares (</text:span><text:span text:style-name="Source_20_Text"><text:span text:style-name="T5">template.c</text:span></text:span><text:span text:style-name="T1">)</text:span></text:h>
      <text:p text:style-name="P1">Sempre que formos criar um novo software utilizando a SDK unificada, a estrutura abaixo deve ser copiada e preenchida. Ela já traz todas as correções de limpeza de propriedades e renderização inteligente de foco que aplicamos.</text:p>
      <text:p text:style-name="P1">C</text:p>
      <text:p text:style-name="P5"><text:span text:style-name="Source_20_Text"><text:span text:style-name="T5">#include "sdk/libgui.h"</text:span></text:span></text:p>
      <text:p text:style-name="P5"><text:span text:style-name="Source_20_Text"><text:span text:style-name="T5">#include "../system/graphics.h"</text:span></text:span></text:p>
      <text:p text:style-name="P5"><text:span text:style-name="Source_20_Text"><text:span text:style-name="T5">#include "../gui/wm.h"</text:span></text:span></text:p>
      <text:p text:style-name="P5"><text:span text:style-name="Source_20_Text"><text:span text:style-name="T5">#include "../system/string.h"</text:span></text:span></text:p>
      <text:p text:style-name="P5"><text:span text:style-name="Source_20_Text"><text:span text:style-name="T5">#include "../system/liblib.h"</text:span></text:span></text:p>
      <text:p text:style-name="P6"><text:soft-page-break/></text:p>
      <text:p text:style-name="P5"><text:span text:style-name="Source_20_Text"><text:span text:style-name="T5">// Componentes do Sistema encapsulados</text:span></text:span></text:p>
      <text:p text:style-name="P5"><text:span text:style-name="Source_20_Text"><text:span text:style-name="T5">#include "components/TOS_IPC.h" <text:s text:c="4"/></text:span></text:span></text:p>
      <text:p text:style-name="P5"><text:span text:style-name="Source_20_Text"><text:span text:style-name="T5">#include "components/TOSSerial.h" <text:s text:c="2"/></text:span></text:span></text:p>
      <text:p text:style-name="P6"/>
      <text:p text:style-name="P5"><text:span text:style-name="Source_20_Text"><text:span text:style-name="T5">// Protótipos obrigatórios do subsistema gráfico</text:span></text:span></text:p>
      <text:p text:style-name="P5"><text:span text:style-name="Source_20_Text"><text:span text:style-name="T5">void gui_draw_form(TForm* form);</text:span></text:span></text:p>
      <text:p text:style-name="P5"><text:span text:style-name="Source_20_Text"><text:span text:style-name="T5">void gui_render_form(TForm* form);</text:span></text:span></text:p>
      <text:p text:style-name="P5"><text:span text:style-name="Source_20_Text"><text:span text:style-name="T5">extern void events_process_mouse(int x, int y, int pressed, int button);</text:span></text:span></text:p>
      <text:p text:style-name="P6"/>
      <text:p text:style-name="P5"><text:span text:style-name="Source_20_Text"><text:span text:style-name="T5">// Variáveis de controle do ambiente da aplicação</text:span></text:span></text:p>
      <text:p text:style-name="P5"><text:span text:style-name="Source_20_Text"><text:span text:style-name="T5">int my_app_slot = -1;</text:span></text:span></text:p>
      <text:p text:style-name="P6"><text:span text:style-name="Source_20_Text"><text:span text:style-name="T5">TGUIEnvironment MyApp;</text:span></text:span></text:p>
      <text:p text:style-name="P6"/>
      <text:p text:style-name="P5"><text:span text:style-name="Source_20_Text"><text:span text:style-name="T5">const int winWidth = 400; <text:s text:c="2"/>// Defina a largura aqui</text:span></text:span></text:p>
      <text:p text:style-name="P5"><text:span text:style-name="Source_20_Text"><text:span text:style-name="T5">const int winHeight = 300; <text:s/>// Defina a altura aqui</text:span></text:span></text:p>
      <text:p text:style-name="P6"/>
      <text:p text:style-name="P5"><text:span text:style-name="Source_20_Text"><text:span text:style-name="T5">// Ponteiros Globais dos Componentes RAD</text:span></text:span></text:p>
      <text:p text:style-name="P5"><text:span text:style-name="Source_20_Text"><text:span text:style-name="T5">TGUIControl* MeuBotao = NULL;</text:span></text:span></text:p>
      <text:p text:style-name="P6"/>
      <text:p text:style-name="P5"><text:span text:style-name="Source_20_Text"><text:span text:style-name="T5">/* ============================================================================</text:span></text:span></text:p>
      <text:p text:style-name="P6"><text:span text:style-name="Source_20_Text"><text:s/></text:span><text:span text:style-name="Source_20_Text"><text:span text:style-name="T5">* FUNÇÃO: Flush_Grafico_Janela (Sincronização Double-Buffer IPC)</text:span></text:span></text:p>
      <text:p text:style-name="P6"><text:span text:style-name="Source_20_Text"><text:s/></text:span><text:span text:style-name="Source_20_Text"><text:span text:style-name="T5">* ============================================================================ */</text:span></text:span></text:p>
      <text:p text:style-name="P5"><text:span text:style-name="Source_20_Text"><text:span text:style-name="T5">void Flush_Grafico_Janela(void) {</text:span></text:span></text:p>
      <text:p text:style-name="P6"><text:span text:style-name="Source_20_Text"><text:s text:c="4"/></text:span><text:span text:style-name="Source_20_Text"><text:span text:style-name="T5">gui_draw_form((TForm*)MyApp.MainWindow);</text:span></text:span></text:p>
      <text:p text:style-name="P6"><text:span text:style-name="Source_20_Text"><text:s text:c="4"/></text:span><text:span text:style-name="Source_20_Text"><text:span text:style-name="T5">gui_render_form((TForm*)MyApp.MainWindow);</text:span></text:span></text:p>
      <text:p text:style-name="P6"><text:span text:style-name="Source_20_Text"><text:s text:c="8"/></text:span></text:p>
      <text:p text:style-name="P5"><text:span text:style-name="Source_20_Text"><text:s text:c="4"/></text:span><text:span text:style-name="Source_20_Text"><text:span text:style-name="T5">int back_idx = (IPC_WINDOW_LIST[my_app_slot].active_buffer == 0) ? 1 : 0;</text:span></text:span></text:p>
      <text:p text:style-name="P5"><text:span text:style-name="Source_20_Text"><text:s text:c="4"/></text:span><text:span text:style-name="Source_20_Text"><text:span text:style-name="T5">uint8_t* shared_ptr = (back_idx == 0) </text:span></text:span></text:p>
      <text:p text:style-name="P5"><text:span text:style-name="Source_20_Text"><text:s text:c="8"/></text:span><text:span text:style-name="Source_20_Text"><text:span text:style-name="T5">? (uint8_t*)(uintptr_t)IPC_WINDOW_LIST[my_app_slot].buffer_ptr_0 </text:span></text:span></text:p>
      <text:p text:style-name="P5"><text:span text:style-name="Source_20_Text"><text:s text:c="8"/></text:span><text:span text:style-name="Source_20_Text"><text:span text:style-name="T5">: (uint8_t*)(uintptr_t)IPC_WINDOW_LIST[my_app_slot].buffer_ptr_1;</text:span></text:span></text:p>
      <text:p text:style-name="P6"><text:span text:style-name="Source_20_Text"><text:s text:c="8"/></text:span></text:p>
      <text:p text:style-name="P5"><text:span text:style-name="Source_20_Text"><text:s text:c="4"/></text:span><text:span text:style-name="Source_20_Text"><text:span text:style-name="T5">uint8_t* local_ptr = graphics_get_buffer();</text:span></text:span></text:p>
      <text:p text:style-name="P5"><text:span text:style-name="Source_20_Text"><text:s text:c="4"/></text:span><text:span text:style-name="Source_20_Text"><text:span text:style-name="T5">if (shared_ptr &amp;&amp; local_ptr) {</text:span></text:span></text:p>
      <text:p text:style-name="P5"><text:span text:style-name="Source_20_Text"><text:s text:c="8"/></text:span><text:span text:style-name="Source_20_Text"><text:span text:style-name="T5">memcpy(shared_ptr, local_ptr, winWidth * winHeight * 4); </text:span></text:span></text:p>
      <text:p text:style-name="P6"><text:span text:style-name="Source_20_Text"><text:s text:c="4"/></text:span><text:span text:style-name="Source_20_Text"><text:span text:style-name="T5">}</text:span></text:span></text:p>
      <text:p text:style-name="P6"><text:span text:style-name="Source_20_Text"><text:s text:c="4"/></text:span><text:span text:style-name="Source_20_Text"><text:span text:style-name="T5">IPC_WINDOW_LIST[my_app_slot].active_buffer = back_idx;</text:span></text:span></text:p>
      <text:p text:style-name="P6"><text:span text:style-name="Source_20_Text"><text:span text:style-name="T5">}</text:span></text:span></text:p>
      <text:p text:style-name="P6"/>
      <text:p text:style-name="P5"><text:span text:style-name="Source_20_Text"><text:span text:style-name="T5">/* ============================================================================</text:span></text:span></text:p>
      <text:p text:style-name="P6"><text:span text:style-name="Source_20_Text"><text:s/></text:span><text:span text:style-name="Source_20_Text"><text:span text:style-name="T5">* FUNÇÃO: Tratar_Fechamento_Software (Garbage Collection Local)</text:span></text:span></text:p>
      <text:p text:style-name="P6"><text:span text:style-name="Source_20_Text"><text:s/></text:span><text:span text:style-name="Source_20_Text"><text:span text:style-name="T5">* ============================================================================ */</text:span></text:span></text:p>
      <text:p text:style-name="P5"><text:span text:style-name="Source_20_Text"><text:span text:style-name="T5">void Tratar_Fechamento_Software(void) {</text:span></text:span></text:p>
      <text:p text:style-name="P5"><text:span text:style-name="Source_20_Text"><text:s text:c="4"/></text:span><text:span text:style-name="Source_20_Text"><text:span text:style-name="T5">if (MyApp.MainWindow) gui_set_prop(MyApp.MainWindow, PROP_VISIBLE, 0);</text:span></text:span></text:p>
      <text:p text:style-name="P6"/>
      <text:p text:style-name="P5"><text:span text:style-name="Source_20_Text"><text:s text:c="4"/></text:span><text:span text:style-name="Source_20_Text"><text:span text:style-name="T5">uint32_t* b0 = (uint32_t*)(uintptr_t)IPC_WINDOW_LIST[my_app_slot].buffer_ptr_0;</text:span></text:span></text:p>
      <text:p text:style-name="P5"><text:span text:style-name="Source_20_Text"><text:s text:c="4"/></text:span><text:span text:style-name="Source_20_Text"><text:span text:style-name="T5">uint32_t* b1 = (uint32_t*)(uintptr_t)IPC_WINDOW_LIST[my_app_slot].buffer_ptr_1;</text:span></text:span></text:p>
      <text:p text:style-name="P5"><text:span text:style-name="Source_20_Text"><text:s text:c="4"/></text:span><text:span text:style-name="Source_20_Text"><text:span text:style-name="T5">if (b0) memset(b0, 0, winWidth * winHeight * 4);</text:span></text:span></text:p>
      <text:p text:style-name="P5"><text:soft-page-break/><text:span text:style-name="Source_20_Text"><text:s text:c="4"/></text:span><text:span text:style-name="Source_20_Text"><text:span text:style-name="T5">if (b1) memset(b1, 0, winWidth * winHeight * 4);</text:span></text:span></text:p>
      <text:p text:style-name="P6"/>
      <text:p text:style-name="P5"><text:span text:style-name="Source_20_Text"><text:s text:c="4"/></text:span><text:span text:style-name="Source_20_Text"><text:span text:style-name="T5">IPC_WINDOW_LIST[my_app_slot].is_active = 0;</text:span></text:span></text:p>
      <text:p text:style-name="P5"><text:span text:style-name="Source_20_Text"><text:s text:c="4"/></text:span><text:span text:style-name="Source_20_Text"><text:span text:style-name="T5">sys_sleep(50); </text:span></text:span></text:p>
      <text:p text:style-name="P6"><text:span text:style-name="Source_20_Text"><text:span text:style-name="T5">}</text:span></text:span></text:p>
      <text:p text:style-name="P6"/>
      <text:p text:style-name="P5"><text:span text:style-name="Source_20_Text"><text:span text:style-name="T5">/* ============================================================================</text:span></text:span></text:p>
      <text:p text:style-name="P6"><text:span text:style-name="Source_20_Text"><text:s/></text:span><text:span text:style-name="Source_20_Text"><text:span text:style-name="T5">* CALLBACK EVENTOS RAD</text:span></text:span></text:p>
      <text:p text:style-name="P6"><text:span text:style-name="Source_20_Text"><text:s/></text:span><text:span text:style-name="Source_20_Text"><text:span text:style-name="T5">* ============================================================================ */</text:span></text:span></text:p>
      <text:p text:style-name="P5"><text:span text:style-name="Source_20_Text"><text:span text:style-name="T5">void OnMeuBotaoClick(void* sender) {</text:span></text:span></text:p>
      <text:p text:style-name="P5"><text:span text:style-name="Source_20_Text"><text:s text:c="4"/></text:span><text:span text:style-name="Source_20_Text"><text:span text:style-name="T5">// Código do evento aqui</text:span></text:span></text:p>
      <text:p text:style-name="P6"><text:span text:style-name="Source_20_Text"><text:span text:style-name="T5">}</text:span></text:span></text:p>
      <text:p text:style-name="P6"/>
      <text:p text:style-name="P5"><text:span text:style-name="Source_20_Text"><text:span text:style-name="T5">/* ============================================================================</text:span></text:span></text:p>
      <text:p text:style-name="P6"><text:span text:style-name="Source_20_Text"><text:s/></text:span><text:span text:style-name="Source_20_Text"><text:span text:style-name="T5">* FUNÇÃO PRINCIPAL</text:span></text:span></text:p>
      <text:p text:style-name="P6"><text:span text:style-name="Source_20_Text"><text:s/></text:span><text:span text:style-name="Source_20_Text"><text:span text:style-name="T5">* ============================================================================ */</text:span></text:span></text:p>
      <text:p text:style-name="P5"><text:span text:style-name="Source_20_Text"><text:span text:style-name="T5">int main(int argc, char* argv[]) {</text:span></text:span></text:p>
      <text:p text:style-name="P5"><text:span text:style-name="Source_20_Text"><text:s text:c="4"/></text:span><text:span text:style-name="Source_20_Text"><text:span text:style-name="T5">static int ultimo_x = 0, ultimo_y = 0, mouse_hold_timer = 0; </text:span></text:span></text:p>
      <text:p text:style-name="P5"><text:span text:style-name="Source_20_Text"><text:s text:c="4"/></text:span><text:span text:style-name="Source_20_Text"><text:span text:style-name="T5">static bool primeiro_desenho = true, ultimo_estado_foco = false;</text:span></text:span></text:p>
      <text:p text:style-name="P6"/>
      <text:p text:style-name="P6"><text:span text:style-name="Source_20_Text"><text:s text:c="4"/></text:span><text:span text:style-name="Source_20_Text"><text:span text:style-name="T5">graphics_init_app(winWidth, winHeight);</text:span></text:span></text:p>
      <text:p text:style-name="P6"><text:span text:style-name="Source_20_Text"><text:s text:c="4"/></text:span><text:span text:style-name="Source_20_Text"><text:span text:style-name="T5">wm_init();</text:span></text:span></text:p>
      <text:p text:style-name="P6"><text:span text:style-name="Source_20_Text"><text:s text:c="4"/></text:span></text:p>
      <text:p text:style-name="P5"><text:span text:style-name="Source_20_Text"><text:s text:c="4"/></text:span><text:span text:style-name="Source_20_Text"><text:span text:style-name="T5">my_app_slot = OS_IPC_RegisterApp("Nome do App", winWidth, winHeight);</text:span></text:span></text:p>
      <text:p text:style-name="P5"><text:span text:style-name="Source_20_Text"><text:s text:c="4"/></text:span><text:span text:style-name="Source_20_Text"><text:span text:style-name="T5">if (my_app_slot == -1) return -1; </text:span></text:span></text:p>
      <text:p text:style-name="P6"><text:span text:style-name="Source_20_Text"><text:s text:c="4"/></text:span></text:p>
      <text:p text:style-name="P6"><text:span text:style-name="Source_20_Text"><text:s text:c="4"/></text:span><text:span text:style-name="Source_20_Text"><text:span text:style-name="T5">graphics_set_slot(my_app_slot);</text:span></text:span></text:p>
      <text:p text:style-name="P5"><text:span text:style-name="Source_20_Text"><text:s text:c="4"/></text:span><text:span text:style-name="Source_20_Text"><text:span text:style-name="T5">GUI_InitApplication(&amp;MyApp, my_app_slot, "Título da Janela v1.0", winWidth, winHeight);</text:span></text:span></text:p>
      <text:p text:style-name="P6"/>
      <text:p text:style-name="P5"><text:span text:style-name="Source_20_Text"><text:s text:c="4"/></text:span><text:span text:style-name="Source_20_Text"><text:span text:style-name="T5">// Ajuste de Cor de Fundo Padrão (Preto)</text:span></text:span></text:p>
      <text:p text:style-name="P5"><text:span text:style-name="Source_20_Text"><text:s text:c="4"/></text:span><text:span text:style-name="Source_20_Text"><text:span text:style-name="T5">if (MyApp.MainWindow) gui_set_prop(MyApp.MainWindow, PROP_COLOR, 0x000000);</text:span></text:span></text:p>
      <text:p text:style-name="P6"/>
      <text:p text:style-name="P5"><text:span text:style-name="Source_20_Text"><text:s text:c="4"/></text:span><text:span text:style-name="Source_20_Text"><text:span text:style-name="T5">/* --- CONSTRUÇÃO DO LAYOUT RAD --- */</text:span></text:span></text:p>
      <text:p text:style-name="P5"><text:span text:style-name="Source_20_Text"><text:s text:c="4"/></text:span><text:span text:style-name="Source_20_Text"><text:span text:style-name="T5">MeuBotao = GUI_CreateButton(&amp;MyApp, 10, 40, 100, 25, "Clique-me", OnMeuBotaoClick);</text:span></text:span></text:p>
      <text:p text:style-name="P6"/>
      <text:p text:style-name="P5"><text:span text:style-name="Source_20_Text"><text:s text:c="4"/></text:span><text:span text:style-name="Source_20_Text"><text:span text:style-name="T5">// Inicialização Visual Primária</text:span></text:span></text:p>
      <text:p text:style-name="P6"><text:span text:style-name="Source_20_Text"><text:s text:c="4"/></text:span><text:span text:style-name="Source_20_Text"><text:span text:style-name="T5">Flush_Grafico_Janela();</text:span></text:span></text:p>
      <text:p text:style-name="P6"/>
      <text:p text:style-name="P5"><text:span text:style-name="Source_20_Text"><text:s text:c="4"/></text:span><text:span text:style-name="Source_20_Text"><text:span text:style-name="T5">/* --- LOOP DE EVENTOS REVISADO --- */</text:span></text:span></text:p>
      <text:p text:style-name="P5"><text:span text:style-name="Source_20_Text"><text:s text:c="4"/></text:span><text:span text:style-name="Source_20_Text"><text:span text:style-name="T5">while(1) {</text:span></text:span></text:p>
      <text:p text:style-name="P5"><text:span text:style-name="Source_20_Text"><text:s text:c="8"/></text:span><text:span text:style-name="Source_20_Text"><text:span text:style-name="T5">if (IPC_WINDOW_LIST[my_app_slot].is_active == 0) {</text:span></text:span></text:p>
      <text:p text:style-name="P6"><text:span text:style-name="Source_20_Text"><text:s text:c="12"/></text:span><text:span text:style-name="Source_20_Text"><text:span text:style-name="T5">Tratar_Fechamento_Software();</text:span></text:span></text:p>
      <text:p text:style-name="P5"><text:span text:style-name="Source_20_Text"><text:s text:c="12"/></text:span><text:span text:style-name="Source_20_Text"><text:span text:style-name="T5">break;</text:span></text:span></text:p>
      <text:p text:style-name="P6"><text:span text:style-name="Source_20_Text"><text:s text:c="8"/></text:span><text:span text:style-name="Source_20_Text"><text:span text:style-name="T5">}</text:span></text:span></text:p>
      <text:p text:style-name="P6"/>
      <text:p text:style-name="P5"><text:span text:style-name="Source_20_Text"><text:s text:c="8"/></text:span><text:span text:style-name="Source_20_Text"><text:span text:style-name="T5">bool euTenhoFoco = (IPC_CONTROL-&gt;active_focus_slot == my_app_slot);</text:span></text:span></text:p>
      <text:p text:style-name="P5"><text:span text:style-name="Source_20_Text"><text:s text:c="8"/></text:span><text:span text:style-name="Source_20_Text"><text:span text:style-name="T5">if (MyApp.MainWindow) ((TForm*)MyApp.MainWindow)-&gt;ActiveFocus = euTenhoFoco;</text:span></text:span></text:p>
      <text:p text:style-name="P6"/>
      <text:p text:style-name="P5"><text:soft-page-break/><text:span text:style-name="Source_20_Text"><text:s text:c="8"/></text:span><text:span text:style-name="Source_20_Text"><text:span text:style-name="T5">bool precisa_redesenhar = false;</text:span></text:span></text:p>
      <text:p text:style-name="P6"/>
      <text:p text:style-name="P5"><text:span text:style-name="Source_20_Text"><text:s text:c="8"/></text:span><text:span text:style-name="Source_20_Text"><text:span text:style-name="T5">if (primeiro_desenho) { primeiro_desenho = false; precisa_redesenhar = true; }</text:span></text:span></text:p>
      <text:p text:style-name="P5"><text:span text:style-name="Source_20_Text"><text:s text:c="8"/></text:span><text:span text:style-name="Source_20_Text"><text:span text:style-name="T5">if (euTenhoFoco != ultimo_estado_foco) { ultimo_estado_foco = euTenhoFoco; precisa_redesenhar = true; }</text:span></text:span></text:p>
      <text:p text:style-name="P6"/>
      <text:p text:style-name="P5"><text:span text:style-name="Source_20_Text"><text:s text:c="8"/></text:span><text:span text:style-name="Source_20_Text"><text:span text:style-name="T5">if (euTenhoFoco) {</text:span></text:span></text:p>
      <text:p text:style-name="P5"><text:span text:style-name="Source_20_Text"><text:s text:c="12"/></text:span><text:span text:style-name="Source_20_Text"><text:span text:style-name="T5">// Teclado</text:span></text:span></text:p>
      <text:p text:style-name="P5"><text:span text:style-name="Source_20_Text"><text:s text:c="12"/></text:span><text:span text:style-name="Source_20_Text"><text:span text:style-name="T5">char key = get_key();</text:span></text:span></text:p>
      <text:p text:style-name="P5"><text:span text:style-name="Source_20_Text"><text:s text:c="12"/></text:span><text:span text:style-name="Source_20_Text"><text:span text:style-name="T5">if (key != 0) { GUI_ProcessKeyboard(&amp;MyApp, key); precisa_redesenhar = true; }</text:span></text:span></text:p>
      <text:p text:style-name="P6"/>
      <text:p text:style-name="P5"><text:span text:style-name="Source_20_Text"><text:s text:c="12"/></text:span><text:span text:style-name="Source_20_Text"><text:span text:style-name="T5">// Mouse Click</text:span></text:span></text:p>
      <text:p text:style-name="P5"><text:span text:style-name="Source_20_Text"><text:s text:c="12"/></text:span><text:span text:style-name="Source_20_Text"><text:span text:style-name="T5">if (IPC_WINDOW_LIST[my_app_slot].has_click_event == 1) {</text:span></text:span></text:p>
      <text:p text:style-name="P5"><text:span text:style-name="Source_20_Text"><text:s text:c="16"/></text:span><text:span text:style-name="Source_20_Text"><text:span text:style-name="T5">if (mouse_hold_timer == 0) {</text:span></text:span></text:p>
      <text:p text:style-name="P5"><text:span text:style-name="Source_20_Text"><text:s text:c="20"/></text:span><text:span text:style-name="Source_20_Text"><text:span text:style-name="T5">int rel_x = IPC_WINDOW_LIST[my_app_slot].local_click_x;</text:span></text:span></text:p>
      <text:p text:style-name="P5"><text:span text:style-name="Source_20_Text"><text:s text:c="20"/></text:span><text:span text:style-name="Source_20_Text"><text:span text:style-name="T5">int rel_y = IPC_WINDOW_LIST[my_app_slot].local_click_y;</text:span></text:span></text:p>
      <text:p text:style-name="P5"><text:span text:style-name="Source_20_Text"><text:s text:c="20"/></text:span><text:span text:style-name="Source_20_Text"><text:span text:style-name="T5">ultimo_x = rel_x; ultimo_y = rel_y; mouse_hold_timer = 2; </text:span></text:span></text:p>
      <text:p text:style-name="P6"/>
      <text:p text:style-name="P5"><text:span text:style-name="Source_20_Text"><text:s text:c="20"/></text:span><text:span text:style-name="Source_20_Text"><text:span text:style-name="T5">// Efeito Visual Pressionado (Se aplicável)</text:span></text:span></text:p>
      <text:p text:style-name="P5"><text:span text:style-name="Source_20_Text"><text:s text:c="20"/></text:span><text:span text:style-name="Source_20_Text"><text:span text:style-name="T5">if (MeuBotao &amp;&amp; rel_x &gt;= MeuBotao-&gt;Left &amp;&amp; rel_x &lt; (MeuBotao-&gt;Left + MeuBotao-&gt;Width) &amp;&amp;</text:span></text:span></text:p>
      <text:p text:style-name="P6"><text:span text:style-name="Source_20_Text"><text:s text:c="24"/></text:span><text:span text:style-name="Source_20_Text"><text:span text:style-name="T5">rel_y &gt;= MeuBotao-&gt;Top &amp;&amp; rel_y &lt; (MeuBotao-&gt;Top + MeuBotao-&gt;Height)) {</text:span></text:span></text:p>
      <text:p text:style-name="P5"><text:span text:style-name="Source_20_Text"><text:s text:c="24"/></text:span><text:span text:style-name="Source_20_Text"><text:span text:style-name="T5">gui_set_prop(MeuBotao, PROP_STATE, 2);</text:span></text:span></text:p>
      <text:p text:style-name="P6"><text:span text:style-name="Source_20_Text"><text:s text:c="20"/></text:span><text:span text:style-name="Source_20_Text"><text:span text:style-name="T5">}</text:span></text:span></text:p>
      <text:p text:style-name="P6"/>
      <text:p text:style-name="P5"><text:span text:style-name="Source_20_Text"><text:s text:c="20"/></text:span><text:span text:style-name="Source_20_Text"><text:span text:style-name="T5">events_process_mouse(rel_x, rel_y, 1, 0);</text:span></text:span></text:p>
      <text:p text:style-name="P5"><text:span text:style-name="Source_20_Text"><text:s text:c="20"/></text:span><text:span text:style-name="Source_20_Text"><text:span text:style-name="T5">if (GUI_ProcessMouseClick(&amp;MyApp, rel_x, rel_y)) precisa_redesenhar = true;</text:span></text:span></text:p>
      <text:p text:style-name="P6"><text:span text:style-name="Source_20_Text"><text:s text:c="16"/></text:span><text:span text:style-name="Source_20_Text"><text:span text:style-name="T5">}</text:span></text:span></text:p>
      <text:p text:style-name="P5"><text:span text:style-name="Source_20_Text"><text:s text:c="16"/></text:span><text:span text:style-name="Source_20_Text"><text:span text:style-name="T5">IPC_WINDOW_LIST[my_app_slot].has_click_event = 0;</text:span></text:span></text:p>
      <text:p text:style-name="P6"><text:span text:style-name="Source_20_Text"><text:s text:c="12"/></text:span><text:span text:style-name="Source_20_Text"><text:span text:style-name="T5">}</text:span></text:span></text:p>
      <text:p text:style-name="P6"/>
      <text:p text:style-name="P5"><text:span text:style-name="Source_20_Text"><text:s text:c="12"/></text:span><text:span text:style-name="Source_20_Text"><text:span text:style-name="T5">// Mouse Release</text:span></text:span></text:p>
      <text:p text:style-name="P5"><text:span text:style-name="Source_20_Text"><text:s text:c="12"/></text:span><text:span text:style-name="Source_20_Text"><text:span text:style-name="T5">if (mouse_hold_timer &gt; 0) {</text:span></text:span></text:p>
      <text:p text:style-name="P6"><text:span text:style-name="Source_20_Text"><text:s text:c="16"/></text:span><text:span text:style-name="Source_20_Text"><text:span text:style-name="T5">mouse_hold_timer--; </text:span></text:span></text:p>
      <text:p text:style-name="P5"><text:span text:style-name="Source_20_Text"><text:s text:c="16"/></text:span><text:span text:style-name="Source_20_Text"><text:span text:style-name="T5">if (mouse_hold_timer == 0) {</text:span></text:span></text:p>
      <text:p text:style-name="P5"><text:span text:style-name="Source_20_Text"><text:s text:c="20"/></text:span><text:span text:style-name="Source_20_Text"><text:span text:style-name="T5">if (MeuBotao) gui_set_prop(MeuBotao, PROP_STATE, 0);</text:span></text:span></text:p>
      <text:p text:style-name="P5"><text:span text:style-name="Source_20_Text"><text:s text:c="20"/></text:span><text:span text:style-name="Source_20_Text"><text:span text:style-name="T5">events_process_mouse(ultimo_x, ultimo_y, 0, 0); </text:span></text:span></text:p>
      <text:p text:style-name="P5"><text:span text:style-name="Source_20_Text"><text:s text:c="20"/></text:span><text:span text:style-name="Source_20_Text"><text:span text:style-name="T5">precisa_redesenhar = true;</text:span></text:span></text:p>
      <text:p text:style-name="P6"><text:span text:style-name="Source_20_Text"><text:s text:c="16"/></text:span><text:span text:style-name="Source_20_Text"><text:span text:style-name="T5">}</text:span></text:span></text:p>
      <text:p text:style-name="P6"><text:span text:style-name="Source_20_Text"><text:s text:c="12"/></text:span><text:span text:style-name="Source_20_Text"><text:span text:style-name="T5">}</text:span></text:span></text:p>
      <text:p text:style-name="P6"><text:span text:style-name="Source_20_Text"><text:s text:c="8"/></text:span><text:span text:style-name="Source_20_Text"><text:span text:style-name="T5">}</text:span></text:span></text:p>
      <text:p text:style-name="P6"/>
      <text:p text:style-name="P5"><text:span text:style-name="Source_20_Text"><text:s text:c="8"/></text:span><text:span text:style-name="Source_20_Text"><text:span text:style-name="T5">// Executado fora do bloco de foco para garantir responsividade visível do WM</text:span></text:span></text:p>
      <text:p text:style-name="P5"><text:span text:style-name="Source_20_Text"><text:s text:c="8"/></text:span><text:span text:style-name="Source_20_Text"><text:span text:style-name="T5">if (precisa_redesenhar) Flush_Grafico_Janela();</text:span></text:span></text:p>
      <text:p text:style-name="P6"><text:span text:style-name="Source_20_Text"><text:s text:c="8"/></text:span></text:p>
      <text:p text:style-name="P5"><text:span text:style-name="Source_20_Text"><text:s text:c="8"/></text:span><text:span text:style-name="Source_20_Text"><text:span text:style-name="T5">sys_sleep(euTenhoFoco ? 16 : 32);</text:span></text:span></text:p>
      <text:p text:style-name="P6"><text:span text:style-name="Source_20_Text"><text:s text:c="4"/></text:span><text:span text:style-name="Source_20_Text"><text:span text:style-name="T5">}</text:span></text:span></text:p>
      <text:p text:style-name="P6"><text:soft-page-break/></text:p>
      <text:p text:style-name="P6"><text:span text:style-name="Source_20_Text"><text:s text:c="4"/></text:span><text:span text:style-name="Source_20_Text"><text:span text:style-name="T5">sys_exit(); </text:span></text:span></text:p>
      <text:p text:style-name="P5"><text:span text:style-name="Source_20_Text"><text:s text:c="4"/></text:span><text:span text:style-name="Source_20_Text"><text:span text:style-name="T5">return 0;</text:span></text:span></text:p>
      <text:p text:style-name="P6"><text:span text:style-name="Source_20_Text"><text:span text:style-name="T5">}</text:span></text:span></text:p>
      <text:h text:style-name="P4" text:outline-level="2">🖥️ <text:span text:style-name="T1">3. O Orchestrator: </text:span><text:span text:style-name="Source_20_Text"><text:span text:style-name="T5">explorer.elf</text:span></text:span><text:span text:style-name="T1"> (Display Server &amp; Compositor)</text:span></text:h>
      <text:p text:style-name="P7"><text:span text:style-name="T5">O </text:span><text:span text:style-name="Source_20_Text"><text:span text:style-name="T5">explorer.elf</text:span></text:span><text:span text:style-name="T5"> (construído a partir do arquivo fonte </text:span><text:span text:style-name="Source_20_Text"><text:span text:style-name="T5">explorer.c</text:span></text:span><text:span text:style-name="T5">) não é um aplicativo comum e não consome a SDK dos aplicativos. Ele é o </text:span><text:span text:style-name="T4">Coração Gráfico do LBF OS</text:span><text:span text:style-name="T5">.</text:span></text:p>
      <text:h text:style-name="P2" text:outline-level="3">Quem é ele?</text:h>
      <text:p text:style-name="P7"><text:span text:style-name="T5">Ele é o </text:span><text:span text:style-name="T4">Compositor de Janelas e Servidor de Exibição (Display Server)</text:span><text:span text:style-name="T5"> nativo do sistema. Ele roda diretamente sobre a camada base do sistema (</text:span><text:span text:style-name="Source_20_Text"><text:span text:style-name="T5">../gui/gui.h</text:span></text:span><text:span text:style-name="T5"> e drivers de vídeo).</text:span></text:p>
      <text:h text:style-name="P2" text:outline-level="3">A Tecnologia: Hardware Clipping &amp; Direct Z-Stack Rendering</text:h>
      <text:list text:style-name="L2">
        <text:list-item>
          <text:p text:style-name="P8"><text:span text:style-name="T4">Arquitetura Cliente-Servidor:</text:span><text:span text:style-name="T5"> Enquanto os softwares da SDK (clientes) preenchem de forma isolada seus respectivos buffers na memória RAM, o </text:span><text:span text:style-name="Source_20_Text"><text:span text:style-name="T5">explorer.elf</text:span></text:span><text:span text:style-name="T5"> (servidor) executa um pipeline contínuo de varredura.</text:span></text:p>
        </text:list-item>
        <text:list-item>
          <text:p text:style-name="P8"><text:span text:style-name="T4">Z-Index Multi-camadas:</text:span><text:span text:style-name="T5"> Ele gerencia uma pilha real de profundidade (</text:span><text:span text:style-name="Source_20_Text"><text:span text:style-name="T5">z_stack</text:span></text:span><text:span text:style-name="T5">). O loop do compositor renderiza o plano de fundo do sistema, lê a pilha de trás para frente copiando os buffers das janelas ativas, joga por cima as interfaces estáticas do sistema e, por fim, renderiza a camada absoluta do cursor do mouse.</text:span></text:p>
        </text:list-item>
        <text:list-item>
          <text:p text:style-name="P8"><text:span text:style-name="T4">Clipping Gráfico Ativo:</text:span><text:span text:style-name="T5"> A tecnologia de clipping avalia as coordenadas espaciais das janelas. Se um aplicativo for arrastado para fora das bordas físicas do monitor (</text:span><text:span text:style-name="Source_20_Text"><text:span text:style-name="T5">screen_w</text:span></text:span><text:span text:style-name="T5">, </text:span><text:span text:style-name="Source_20_Text"><text:span text:style-name="T5">screen_h</text:span></text:span><text:span text:style-name="T5">), o </text:span><text:span text:style-name="Source_20_Text"><text:span text:style-name="T5">explorer</text:span></text:span><text:span text:style-name="T5"> corta os pixels excedentes dinamicamente em tempo real em memória para evitar que o sistema tente gravar em endereços de memória inválidos (</text:span><text:span text:style-name="T6">Kernel Panic</text:span><text:span text:style-name="T5"> ou </text:span><text:span text:style-name="T6">Segmentation Fault</text:span><text:span text:style-name="T5">).</text:span></text:p>
        </text:list-item>
        <text:list-item>
          <text:p text:style-name="P8"><text:span text:style-name="T4">Hit-Testing Global:</text:span><text:span text:style-name="T5"> O </text:span><text:span text:style-name="Source_20_Text"><text:span text:style-name="T5">explorer</text:span></text:span><text:span text:style-name="T5"> captura os eventos puros do hardware do mouse (</text:span><text:span text:style-name="Source_20_Text"><text:span text:style-name="T5">get_mouse</text:span></text:span><text:span text:style-name="T5">). Ele calcula se o clique atingiu a barra de título (ativando o arrasto de janela), o botão fechar </text:span><text:span text:style-name="Source_20_Text"><text:span text:style-name="T5">[X]</text:span></text:span><text:span text:style-name="T5"> (encerrando a estrutura IPC do app) ou a área interna do cliente (mapeando a coordenada global e injetando a coordenada local calculada diretamente dentro da estrutura </text:span><text:span text:style-name="Source_20_Text"><text:span text:style-name="T5">IPC_WINDOW_LIST</text:span></text:span><text:span text:style-name="T5"> para o app responder no seu loop privado).</text:span></text:p>
        </text:list-item>
      </text:list>
      <text:h text:style-name="P9" text:outline-level="3"><text:soft-page-break/>📝 <text:span text:style-name="T1">Resumo de Identificação Rápida</text:span>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10"><text:span text:style-name="Strong_20_Emphasis"><text:span text:style-name="T5">Componente / Arquivo</text:span></text:span></text:p>
            </table:table-cell>
            <table:table-cell table:style-name="Tabela1.A1" office:value-type="string">
              <text:p text:style-name="P10"><text:span text:style-name="Strong_20_Emphasis"><text:span text:style-name="T5">Tipo de Tecnologia</text:span></text:span></text:p>
            </table:table-cell>
            <table:table-cell table:style-name="Tabela1.A1" office:value-type="string">
              <text:p text:style-name="P10"><text:span text:style-name="Strong_20_Emphasis"><text:span text:style-name="T5">Dependência</text:span></text:span></text:p>
            </table:table-cell>
            <table:table-cell table:style-name="Tabela1.A1" office:value-type="string">
              <text:p text:style-name="P10"><text:span text:style-name="Strong_20_Emphasis"><text:span text:style-name="T5">Função Primária</text:span></text:span></text:p>
            </table:table-cell>
          </table:table-row>
        </table:table-header-rows>
        <table:table-row>
          <table:table-cell table:style-name="Tabela1.A1" office:value-type="string">
            <text:p text:style-name="P11"><text:span text:style-name="Source_20_Text"><text:span text:style-name="T4">explorer.elf</text:span></text:span></text:p>
          </table:table-cell>
          <table:table-cell table:style-name="Tabela1.A1" office:value-type="string">
            <text:p text:style-name="P12">Servidor Gráfico / Compositor</text:p>
          </table:table-cell>
          <table:table-cell table:style-name="Tabela1.A1" office:value-type="string">
            <text:p text:style-name="P11"><text:span text:style-name="Source_20_Text"><text:span text:style-name="T5">gui/gui.h</text:span></text:span><text:span text:style-name="T5"> (Direto)</text:span></text:p>
          </table:table-cell>
          <table:table-cell table:style-name="Tabela1.A1" office:value-type="string">
            <text:p text:style-name="P12">Fusão de buffers em tela, Z-Order, Mouse global e gerenciamento de overlays (Menu Iniciar).</text:p>
          </table:table-cell>
        </table:table-row>
        <table:table-row>
          <table:table-cell table:style-name="Tabela1.A1" office:value-type="string">
            <text:p text:style-name="P11"><text:span text:style-name="Source_20_Text"><text:span text:style-name="T4">tarefa</text:span></text:span><text:span text:style-name="T4">, </text:span><text:span text:style-name="Source_20_Text"><text:span text:style-name="T4">gfile</text:span></text:span><text:span text:style-name="T4">, </text:span><text:span text:style-name="Source_20_Text"><text:span text:style-name="T4">terminal</text:span></text:span><text:span text:style-name="T4">.elf</text:span></text:p>
          </table:table-cell>
          <table:table-cell table:style-name="Tabela1.A1" office:value-type="string">
            <text:p text:style-name="P12">Aplicações Cliente / Userland</text:p>
          </table:table-cell>
          <table:table-cell table:style-name="Tabela1.A1" office:value-type="string">
            <text:p text:style-name="P11"><text:span text:style-name="Source_20_Text"><text:span text:style-name="T5">sdk/libgui.h</text:span></text:span><text:span text:style-name="T5"> (SDK RAD)</text:span></text:p>
          </table:table-cell>
          <table:table-cell table:style-name="Tabela1.A1" office:value-type="string">
            <text:p text:style-name="P12">Processamento lógico e desenho em buffers privados via gerenciamento de componente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8.4.2$Linux_X86_64 LibreOffice_project/580$Build-2</meta:generator>
    <dc:date>2026-07-01T12:04:06.510754310</dc:date>
    <meta:editing-duration>PT14S</meta:editing-duration>
    <meta:editing-cycles>1</meta:editing-cycles>
    <meta:document-statistic meta:table-count="1" meta:image-count="0" meta:object-count="0" meta:page-count="6" meta:paragraph-count="157" meta:word-count="1107" meta:character-count="9547" meta:non-whitespace-character-count="7783"/>
  </office:meta>
</office:document-meta>
</file>