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501" officeooo:paragraph-rsid="000a25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car no kernel.c no local da que estiver nele</text:p>
      <text:p text:style-name="Standard"/>
      <text:p text:style-name="Standard">if (bga_is_available()) {</text:p>
      <text:p text:style-name="Standard"><text:s text:c="8"/>// Força a janela do emulador a ir para 800x600</text:p>
      <text:p text:style-name="Standard"><text:s text:c="8"/>bga_set_video_mode(800, 600, 32); </text:p>
      <text:p text:style-name="Standard"><text:s text:c="8"/>// Sobrescreve as variáveis do boot para casar com a nova realidade do hardware</text:p>
      <text:p text:style-name="Standard"><text:s text:c="8"/>width_raw = 800;</text:p>
      <text:p text:style-name="Standard"><text:s text:c="8"/>height_raw = 600;</text:p>
      <text:p text:style-name="Standard"><text:s text:c="8"/>pitch_raw = 800 * 4; // 800 pixels * 4 bytes</text:p>
      <text:p text:style-name="Standard"><text:s text:c="8"/>bpp_raw = 32; <text:s text:c="8"/></text:p>
      <text:p text:style-name="Standard"><text:s text:c="4"/>}</text:p>
      <text:p text:style-name="Standard"/>
      <text:p text:style-name="Standard">if (bga_is_available()) {</text:p>
      <text:p text:style-name="Standard"><text:s text:c="8"/>// Força a janela do emulador a ir para 1280x720</text:p>
      <text:p text:style-name="Standard"><text:s text:c="8"/>bga_set_video_mode(1280, 720, 32); </text:p>
      <text:p text:style-name="Standard"><text:s text:c="8"/>// Sobrescreve as variáveis do boot para casar com a nova realidade do hardware</text:p>
      <text:p text:style-name="Standard"><text:s text:c="8"/>width_raw = 1280;</text:p>
      <text:p text:style-name="Standard"><text:s text:c="8"/>height_raw = 720;</text:p>
      <text:p text:style-name="Standard"><text:s text:c="8"/>pitch_raw = 1280 * 4; // 1280 pixels * 4 bytes</text:p>
      <text:p text:style-name="Standard"><text:s text:c="8"/>bpp_raw = 32; <text:s text:c="8"/></text:p>
      <text:p text:style-name="Standard"><text:s text:c="4"/>}</text:p>
      <text:p text:style-name="Standard"/>
      <text:p text:style-name="Standard">if (bga_is_available()) {</text:p>
      <text:p text:style-name="Standard"><text:s text:c="8"/>// Força a janela do emulador a ir para 1024x768 estável</text:p>
      <text:p text:style-name="Standard"><text:s text:c="8"/>bga_set_video_mode(1024, 768, 32); </text:p>
      <text:p text:style-name="Standard"><text:s text:c="8"/>// Sobrescreve as variáveis do boot para casar com a nova realidade do hardware</text:p>
      <text:p text:style-name="Standard"><text:s text:c="8"/>width_raw = 1024;</text:p>
      <text:p text:style-name="Standard"><text:s text:c="8"/>height_raw = 768;</text:p>
      <text:p text:style-name="Standard"><text:s text:c="8"/>pitch_raw = 1024 * 4; // 1024 pixels * 4 bytes (32 BPP)</text:p>
      <text:p text:style-name="Standard"><text:s text:c="8"/>bpp_raw = 32; <text:s text:c="8"/>// &lt;-- ADICIONE EXATAMENTE AQUI!</text:p>
      <text:p text:style-name="Standard"><text:s text:c="4"/>}</text:p>
      <text:p text:style-name="Standard"/>
      <text:p text:style-name="Standard">if (bga_is_available()) {</text:p>
      <text:p text:style-name="Standard"><text:s text:c="8"/>// Força a janela do emulador a ir para 1366x768 nativo imediatamente!</text:p>
      <text:p text:style-name="Standard"><text:s text:c="8"/>bga_set_video_mode(1366, 768, 32); </text:p>
      <text:p text:style-name="Standard"><text:s text:c="8"/>// Sobrescreve as variáveis do boot para casar com a nova realidade do hardware</text:p>
      <text:p text:style-name="Standard"><text:s text:c="8"/>width_raw = 1366;</text:p>
      <text:p text:style-name="Standard"><text:s text:c="8"/>height_raw = 768;</text:p>
      <text:p text:style-name="Standard"><text:s text:c="8"/>pitch_raw = 1366 * 4; // 1366 pixels * 4 bytes</text:p>
      <text:p text:style-name="Standard"><text:s text:c="8"/>bpp_raw = 32; <text:s text:c="8"/>// Mantém a sincronia em 32 bits que salvou o projeto!</text:p>
      <text:p text:style-name="Standard"><text:s text:c="4"/>}</text:p>
      <text:p text:style-name="Standard"/>
      <text:p text:style-name="Standard">if (bga_is_available()) {</text:p>
      <text:p text:style-name="Standard"><text:s text:c="8"/>// Força a janela do emulador a ir para 1920x1080 nativo</text:p>
      <text:p text:style-name="Standard"><text:s text:c="8"/>bga_set_video_mode(1920, 1080, 32); </text:p>
      <text:p text:style-name="Standard"><text:s text:c="8"/>// Sobrescreve as variáveis do boot para casar com a nova realidade do hardware</text:p>
      <text:p text:style-name="Standard"><text:s text:c="8"/>width_raw = 1920;</text:p>
      <text:p text:style-name="Standard"><text:s text:c="8"/>height_raw = 1080;</text:p>
      <text:p text:style-name="Standard"><text:s text:c="8"/>pitch_raw = 1920 * 4; // 1920 pixels * 4 bytes</text:p>
      <text:p text:style-name="Standard"><text:s text:c="8"/>bpp_raw = 32; <text:s text:c="8"/></text:p>
      <text:p text:style-name="Standard"><text:soft-page-break/><text:s text:c="4"/>}<text:line-break/><text:line-break/># LBF OS v0.8.2 - Sistema Operacional de Código Aberto</text:p>
      <text:p text:style-name="Standard"/>
      <text:p text:style-name="Standard">Um sistema operacional de 64 bits em modo protegido (Ring 0 / Ring 3), multitarefa, com interface gráfica nativa em alta resolução e ambiente de desenvolvimento RAD integrado.</text:p>
      <text:p text:style-name="Standard"/>
      <text:p text:style-name="Standard">## 🚀 Novidades da Versão (Atualização BGA Driver)</text:p>
      <text:p text:style-name="Standard">O Kernel agora conta com suporte nativo ao **BGA (Bochs Graphics Adapter)**, permitindo resoluções modernas diretamente através do controle de hardware emulado, eliminando a dependência de modos antigos de BIOS em tempo de execução.</text:p>
      <text:p text:style-name="Standard"/>
      <text:p text:style-name="Standard">- **Resolução Nativa:** Suporte total a **1920x1080 (Full HD)**, 1366x768 e 1024x768, todas operando em **32 BPP (Bits Per Pixel)** com sincronia perfeita entre Kernel e Ring 3.</text:p>
      <text:p text:style-name="Standard">- **Double Buffering:** Gerenciamento eficiente de memória física no `video.c` para evitar tearing visual.</text:p>
      <text:p text:style-name="Standard">- **Ring 3 Isolado:** Interface gráfica (`explorer.elf`), terminal e utilitários rodando de forma totalmente segura no espaço do usuário.</text:p>
      <text:p text:style-name="Standard"/>
      <text:p text:style-name="Standard">## 🛠️ Recursos Atuais do Sistema</text:p>
      <text:p text:style-name="Standard">* **Interface Gráfica RAD:** Componentes como `TButton`, `TEdit`, `ComboBox` e janelas interativas móveis.</text:p>
      <text:p text:style-name="Standard">* **Multitarefa Real:** Gerenciador de Tarefas exibindo PIDs e estados dos processos (`Ready`, `Running`).</text:p>
      <text:p text:style-name="Standard">* **G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7-02T18:43:12.239931475</dc:date>
    <meta:editing-duration>PT2M48S</meta:editing-duration>
    <meta:editing-cycles>5</meta:editing-cycles>
    <meta:document-statistic meta:table-count="0" meta:image-count="0" meta:object-count="0" meta:page-count="2" meta:paragraph-count="56" meta:word-count="462" meta:character-count="3110" meta:non-whitespace-character-count="2355"/>
  </office:meta>
</office:document-meta>
</file>